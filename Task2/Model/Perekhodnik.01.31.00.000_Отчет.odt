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9000002E753BF76B9.png" manifest:media-type="image/png"/>
  <manifest:file-entry manifest:full-path="Pictures/10000001000001E3000002B28059E2B3.png" manifest:media-type="image/png"/>
  <manifest:file-entry manifest:full-path="Pictures/100000010000031C000002E16BF2A6FE.png" manifest:media-type="image/png"/>
  <manifest:file-entry manifest:full-path="Pictures/10000001000002300000007BA6373B36.png" manifest:media-type="image/png"/>
  <manifest:file-entry manifest:full-path="Pictures/10000001000001C9000002320AE464D5.png" manifest:media-type="image/png"/>
  <manifest:file-entry manifest:full-path="Pictures/100000010000010A0000018322D13299.png" manifest:media-type="image/png"/>
  <manifest:file-entry manifest:full-path="Pictures/1000000100000320000002E3C255EF09.png" manifest:media-type="image/png"/>
  <manifest:file-entry manifest:full-path="Pictures/10000001000001D90000023A774C7A1B.png" manifest:media-type="image/png"/>
  <manifest:file-entry manifest:full-path="Pictures/10000001000002B8000001D4643E0E26.png" manifest:media-type="image/png"/>
  <manifest:file-entry manifest:full-path="Pictures/100000010000023E0000023D524C5ADE.png" manifest:media-type="image/png"/>
  <manifest:file-entry manifest:full-path="Pictures/1000000100000332000002C863D11586.png" manifest:media-type="image/png"/>
  <manifest:file-entry manifest:full-path="Pictures/100000010000029C0000022282035BE3.png" manifest:media-type="image/png"/>
  <manifest:file-entry manifest:full-path="Pictures/1000000100000322000002E47DDE1DF3.png" manifest:media-type="image/png"/>
  <manifest:file-entry manifest:full-path="Pictures/100000010000020E0000015989F37647.png" manifest:media-type="image/png"/>
  <manifest:file-entry manifest:full-path="Pictures/10000001000001DA000001837A463890.png" manifest:media-type="image/png"/>
  <manifest:file-entry manifest:full-path="Pictures/1000000100000282000001E11DFEE1E1.png" manifest:media-type="image/png"/>
  <manifest:file-entry manifest:full-path="Pictures/100000010000026900000148FC11CC7E.png" manifest:media-type="image/png"/>
  <manifest:file-entry manifest:full-path="Pictures/10000001000002A0000001B6EDC4930B.png" manifest:media-type="image/png"/>
  <manifest:file-entry manifest:full-path="Pictures/1000000100000274000000B59EF829C2.png" manifest:media-type="image/png"/>
  <manifest:file-entry manifest:full-path="Pictures/10000001000001F400000121136E971C.png" manifest:media-type="image/png"/>
  <manifest:file-entry manifest:full-path="Pictures/100000010000020D000000A3F648E45C.png" manifest:media-type="image/png"/>
  <manifest:file-entry manifest:full-path="Pictures/10000001000000F50000018D50F58A41.png" manifest:media-type="image/png"/>
  <manifest:file-entry manifest:full-path="Pictures/10000001000000D4000000C05DC88F4A.png" manifest:media-type="image/png"/>
  <manifest:file-entry manifest:full-path="Pictures/10000001000000CC000000A42DF67BE6.png" manifest:media-type="image/png"/>
  <manifest:file-entry manifest:full-path="Pictures/100000010000009100000091631FF38A.png" manifest:media-type="image/png"/>
  <manifest:file-entry manifest:full-path="Pictures/1000000100000224000001ABF7D67B1A.png" manifest:media-type="image/png"/>
  <manifest:file-entry manifest:full-path="Pictures/100000010000024B0000023F747969C6.png" manifest:media-type="image/png"/>
  <manifest:file-entry manifest:full-path="Pictures/1000000100000242000002B7A445A7F0.png" manifest:media-type="image/png"/>
  <manifest:file-entry manifest:full-path="Pictures/10000001000001BF00000225135C988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Regular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fo:text-align="center" style:justify-single-word="false" style:page-number="auto" fo:break-before="page"/>
      <style:text-properties fo:text-transform="uppercase" fo:language="ru" fo:country="RU" officeooo:rsid="004135e2" officeooo:paragraph-rsid="004135e2"/>
    </style:style>
    <style:style style:name="P2" style:family="paragraph" style:parent-style-name="Text_20_body">
      <style:paragraph-properties fo:text-align="center" style:justify-single-word="false"/>
      <style:text-properties officeooo:rsid="004135e2" officeooo:paragraph-rsid="004135e2"/>
    </style:style>
    <style:style style:name="P3" style:family="paragraph" style:parent-style-name="Text_20_body">
      <style:paragraph-properties fo:text-align="center" style:justify-single-word="false"/>
      <style:text-properties officeooo:paragraph-rsid="004135e2"/>
    </style:style>
    <style:style style:name="P4" style:family="paragraph" style:parent-style-name="Text_20_body" style:master-page-name="">
      <loext:graphic-properties draw:fill="none"/>
      <style:paragraph-properties fo:margin-left="0cm" fo:margin-right="0cm" fo:line-height="150%" fo:text-align="start" style:justify-single-word="false" fo:text-indent="10.4cm" style:auto-text-indent="false" style:page-number="auto" fo:background-color="transparent">
        <style:tab-stops/>
      </style:paragraph-properties>
    </style:style>
    <style:style style:name="P5" style:family="paragraph" style:parent-style-name="Text_20_body">
      <loext:graphic-properties draw:fill="none"/>
      <style:paragraph-properties fo:margin-left="0cm" fo:margin-right="0cm" fo:line-height="150%" fo:text-align="start" style:justify-single-word="false" fo:text-indent="10.4cm" style:auto-text-indent="false" fo:background-color="transparent">
        <style:tab-stops/>
      </style:paragraph-properties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 style:list-style-name="">
      <style:paragraph-properties fo:line-height="150%" fo:text-align="justify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4151af" officeooo:paragraph-rsid="004151af"/>
    </style:style>
    <style:style style:name="P10" style:family="paragraph" style:parent-style-name="Text_20_body">
      <style:text-properties fo:language="ru" fo:country="RU" officeooo:rsid="00425af7" officeooo:paragraph-rsid="00425af7"/>
    </style:style>
    <style:style style:name="P11" style:family="paragraph" style:parent-style-name="Text_20_body">
      <style:text-properties officeooo:rsid="004151af" officeooo:paragraph-rsid="00425af7"/>
    </style:style>
    <style:style style:name="P12" style:family="paragraph" style:parent-style-name="Text_20_body">
      <style:text-properties officeooo:rsid="00425af7" officeooo:paragraph-rsid="00425af7"/>
    </style:style>
    <style:style style:name="P13" style:family="paragraph" style:parent-style-name="Text_20_body">
      <style:paragraph-properties fo:break-before="page"/>
      <style:text-properties officeooo:rsid="00425af7" officeooo:paragraph-rsid="00425af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122cm, 0cm, 0.6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637cm, 0cm, 0.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Отчет по созданию сборки сверху</text:p>
      <text:p text:style-name="P2">Основы автоматизированного проектирования</text:p>
      <text:p text:style-name="P3">Деталь: Переходник (01.31.00.000)</text:p>
      <text:p text:style-name="P3"/>
      <text:p text:style-name="P4">Выполнил: Алексеев Павел</text:p>
      <text:p text:style-name="P5">ФКН, курс 3, группа 9</text:p>
      <text:p text:style-name="P6"/>
      <text:h text:style-name="Heading_20_1" text:outline-level="1">Базовая геометрия</text:h>
      <text:h text:style-name="P7" text:outline-level="1"><draw:frame draw:style-name="fr1" draw:name="Image1" text:anchor-type="char" svg:x="2.378cm" svg:y="2.716cm" svg:width="9.931cm" svg:height="14.185cm" draw:z-index="0"><draw:image xlink:href="Pictures/10000001000001E3000002B28059E2B3.png" xlink:type="simple" xlink:show="embed" xlink:actuate="onLoad" draw:mime-type="image/png"/></draw:frame></text:h>
      <text:h text:style-name="P8" text:outline-level="1">Общая рабочая часть</text:h>
      <text:p text:style-name="P9">Верхняя прокладка и заглушка</text:p>
      <text:p text:style-name="P9"><draw:frame draw:style-name="fr2" draw:name="Image3" text:anchor-type="char" svg:x="-0.034cm" svg:y="0.302cm" svg:width="8.079cm" svg:height="9.932cm" draw:z-index="1"><draw:image xlink:href="Pictures/10000001000001C9000002320AE464D5.png" xlink:type="simple" xlink:show="embed" xlink:actuate="onLoad" draw:mime-type="image/png"/></draw:frame><draw:frame draw:style-name="fr2" draw:name="Image2" text:anchor-type="char" svg:x="8.664cm" svg:y="0.347cm" svg:width="8.259cm" svg:height="9.952cm" draw:z-index="2"><draw:image xlink:href="Pictures/10000001000001D90000023A774C7A1B.png" xlink:type="simple" xlink:show="embed" xlink:actuate="onLoad" draw:mime-type="image/png"/></draw:frame></text:p>
      <text:p text:style-name="P9">Нижняя прокладка и фланец</text:p>
      <text:p text:style-name="P9"><draw:frame draw:style-name="fr2" draw:name="Image4" text:anchor-type="char" svg:x="-0.826cm" svg:y="0.295cm" svg:width="8.786cm" svg:height="8.77cm" draw:z-index="3"><draw:image xlink:href="Pictures/100000010000023E0000023D524C5ADE.png" xlink:type="simple" xlink:show="embed" xlink:actuate="onLoad" draw:mime-type="image/png"/></draw:frame><draw:frame draw:style-name="fr2" draw:name="Image5" text:anchor-type="char" svg:x="8.465cm" svg:y="0.325cm" svg:width="8.632cm" svg:height="8.798cm" draw:z-index="4"><draw:image xlink:href="Pictures/10000001000002D9000002E753BF76B9.png" xlink:type="simple" xlink:show="embed" xlink:actuate="onLoad" draw:mime-type="image/png"/></draw:frame></text:p>
      <text:p text:style-name="P9"/>
      <text:h text:style-name="P8" text:outline-level="1">Рабочая часть сварного корпуса</text:h>
      <text:p text:style-name="P9">Нижний фланец и патрубок</text:p>
      <text:p text:style-name="Text_20_body"><draw:frame draw:style-name="fr2" draw:name="Image6" text:anchor-type="char" svg:x="-0.833cm" svg:y="0.176cm" svg:width="8.789cm" svg:height="7.65cm" draw:z-index="5"><draw:image xlink:href="Pictures/1000000100000332000002C863D11586.png" xlink:type="simple" xlink:show="embed" xlink:actuate="onLoad" draw:mime-type="image/png"/></draw:frame><draw:frame draw:style-name="fr2" draw:name="Image7" text:anchor-type="char" svg:x="8.394cm" svg:y="0.206cm" svg:width="8.221cm" svg:height="7.611cm" draw:z-index="6"><draw:image xlink:href="Pictures/100000010000031C000002E16BF2A6FE.png" xlink:type="simple" xlink:show="embed" xlink:actuate="onLoad" draw:mime-type="image/png"/></draw:frame><text:line-break/></text:p>
      <text:p text:style-name="P9"/>
      <text:p text:style-name="P9">Верхний фланец и бобышка</text:p>
      <text:p text:style-name="P9"><draw:frame draw:style-name="fr2" draw:name="Image8" text:anchor-type="char" svg:x="-0.603cm" svg:y="0.088cm" svg:width="8.326cm" svg:height="7.691cm" draw:z-index="7"><draw:image xlink:href="Pictures/1000000100000320000002E3C255EF09.png" xlink:type="simple" xlink:show="embed" xlink:actuate="onLoad" draw:mime-type="image/png"/></draw:frame><draw:frame draw:style-name="fr2" draw:name="Image9" text:anchor-type="char" svg:x="8.209cm" svg:y="0.118cm" svg:width="8.313cm" svg:height="7.669cm" draw:z-index="8"><draw:image xlink:href="Pictures/1000000100000322000002E47DDE1DF3.png" xlink:type="simple" xlink:show="embed" xlink:actuate="onLoad" draw:mime-type="image/png"/></draw:frame></text:p>
      <text:h text:style-name="P7" text:outline-level="1"/>
      <text:h text:style-name="P8" text:outline-level="1">Детали для сборки</text:h>
      <text:p text:style-name="P10">Верхняя прокладка</text:p>
      <text:p text:style-name="P11"><draw:frame draw:style-name="fr1" draw:name="Image10" text:anchor-type="char" svg:x="2.549cm" svg:y="0.325cm" svg:width="9.738cm" svg:height="6.387cm" draw:z-index="9"><draw:image xlink:href="Pictures/100000010000020E0000015989F37647.png" xlink:type="simple" xlink:show="embed" xlink:actuate="onLoad" draw:mime-type="image/png"/></draw:frame></text:p>
      <text:p text:style-name="P12"><draw:frame draw:style-name="fr1" draw:name="Image11" text:anchor-type="char" svg:x="0.527cm" svg:y="1.265cm" svg:width="6.272cm" svg:height="5.121cm" draw:z-index="10"><draw:image xlink:href="Pictures/10000001000001DA000001837A463890.png" xlink:type="simple" xlink:show="embed" xlink:actuate="onLoad" draw:mime-type="image/png"/></draw:frame><draw:frame draw:style-name="fr1" draw:name="Image12" text:anchor-type="char" svg:x="8.013cm" svg:y="2.713cm" svg:width="7.146cm" svg:height="1.57cm" draw:z-index="11"><draw:image xlink:href="Pictures/10000001000002300000007BA6373B36.png" xlink:type="simple" xlink:show="embed" xlink:actuate="onLoad" draw:mime-type="image/png"/></draw:frame>Заглушка</text:p>
      <text:p text:style-name="P12"/>
      <text:p text:style-name="P12">Нижняя прокладка</text:p>
      <text:p text:style-name="P12"><draw:frame draw:style-name="fr1" draw:name="Image13" text:anchor-type="char" svg:x="2.626cm" svg:y="0cm" svg:width="9.368cm" svg:height="7.019cm" draw:z-index="12"><draw:image xlink:href="Pictures/1000000100000282000001E11DFEE1E1.png" xlink:type="simple" xlink:show="embed" xlink:actuate="onLoad" draw:mime-type="image/png"/></draw:frame></text:p>
      <text:p text:style-name="P12"><text:soft-page-break/>Фланец</text:p>
      <text:p text:style-name="P12"><draw:frame draw:style-name="fr1" draw:name="Image14" text:anchor-type="char" svg:x="-0.917cm" svg:y="0cm" svg:width="8.13cm" svg:height="5.466cm" draw:z-index="13"><draw:image xlink:href="Pictures/10000001000002B8000001D4643E0E26.png" xlink:type="simple" xlink:show="embed" xlink:actuate="onLoad" draw:mime-type="image/png"/></draw:frame><draw:frame draw:style-name="fr3" draw:name="Image15" text:anchor-type="char" svg:x="7.837cm" svg:y="0.076cm" svg:width="8.996cm" svg:height="5.348cm" draw:z-index="14"><draw:image xlink:href="Pictures/100000010000026900000148FC11CC7E.png" xlink:type="simple" xlink:show="embed" xlink:actuate="onLoad" draw:mime-type="image/png"/></draw:frame></text:p>
      <text:p text:style-name="P12">Сварной корпус<draw:frame draw:style-name="fr1" draw:name="Image16" text:anchor-type="char" svg:x="-0.344cm" svg:y="1cm" svg:width="7.036cm" svg:height="4.586cm" draw:z-index="15"><draw:image xlink:href="Pictures/10000001000002A0000001B6EDC4930B.png" xlink:type="simple" xlink:show="embed" xlink:actuate="onLoad" draw:mime-type="image/png"/></draw:frame>. Нижний фланец</text:p>
      <text:p text:style-name="P12"><draw:frame draw:style-name="fr1" draw:name="Image17" text:anchor-type="char" svg:x="7.195cm" svg:y="0.871cm" svg:width="9.68cm" svg:height="2.789cm" draw:z-index="16"><draw:image xlink:href="Pictures/1000000100000274000000B59EF829C2.png" xlink:type="simple" xlink:show="embed" xlink:actuate="onLoad" draw:mime-type="image/png"/></draw:frame></text:p>
      <text:p text:style-name="P12">Сварной корпус. Верхний фланец</text:p>
      <text:p text:style-name="P12"><draw:frame draw:style-name="fr1" draw:name="Image18" text:anchor-type="char" svg:x="-0.335cm" svg:y="0.058cm" svg:width="7.793cm" svg:height="4.503cm" draw:z-index="17"><draw:image xlink:href="Pictures/10000001000001F400000121136E971C.png" xlink:type="simple" xlink:show="embed" xlink:actuate="onLoad" draw:mime-type="image/png"/></draw:frame><draw:frame draw:style-name="fr4" draw:name="Image19" text:anchor-type="char" svg:x="7.763cm" svg:y="0.492cm" svg:width="9.326cm" svg:height="3.235cm" draw:z-index="18"><draw:image xlink:href="Pictures/100000010000020D000000A3F648E45C.png" xlink:type="simple" xlink:show="embed" xlink:actuate="onLoad" draw:mime-type="image/png"/></draw:frame></text:p>
      <text:p text:style-name="P12"/>
      <text:p text:style-name="P13">Сварной корпус. Патрубок</text:p>
      <text:p text:style-name="P12"><draw:frame draw:style-name="fr1" draw:name="Image20" text:anchor-type="char" svg:x="0.118cm" svg:y="0.134cm" svg:width="7.038cm" svg:height="10.239cm" draw:z-index="19"><draw:image xlink:href="Pictures/100000010000010A0000018322D13299.png" xlink:type="simple" xlink:show="embed" xlink:actuate="onLoad" draw:mime-type="image/png"/></draw:frame><draw:frame draw:style-name="fr1" draw:name="Image21" text:anchor-type="char" svg:x="8.682cm" svg:y="0.044cm" svg:width="6.396cm" svg:height="10.365cm" draw:z-index="20"><draw:image xlink:href="Pictures/10000001000000F50000018D50F58A41.png" xlink:type="simple" xlink:show="embed" xlink:actuate="onLoad" draw:mime-type="image/png"/></draw:frame></text:p>
      <text:p text:style-name="P12">Сварной корпус. Бобышка</text:p>
      <text:p text:style-name="P12"/>
      <text:p text:style-name="P12"><draw:frame draw:style-name="fr1" draw:name="Image22" text:anchor-type="char" svg:x="-0.056cm" svg:y="0cm" svg:width="4.808cm" svg:height="4.355cm" draw:z-index="21"><draw:image xlink:href="Pictures/10000001000000D4000000C05DC88F4A.png" xlink:type="simple" xlink:show="embed" xlink:actuate="onLoad" draw:mime-type="image/png"/></draw:frame><draw:frame draw:style-name="fr1" draw:name="Image23" text:anchor-type="char" svg:x="5.581cm" svg:y="0.028cm" svg:width="5.398cm" svg:height="4.339cm" draw:z-index="22"><draw:image xlink:href="Pictures/10000001000000CC000000A42DF67BE6.png" xlink:type="simple" xlink:show="embed" xlink:actuate="onLoad" draw:mime-type="image/png"/></draw:frame><draw:frame draw:style-name="fr1" draw:name="Image24" text:anchor-type="char" svg:x="11.659cm" svg:y="0.058cm" svg:width="4.293cm" svg:height="4.293cm" draw:z-index="23"><draw:image xlink:href="Pictures/100000010000009100000091631FF38A.png" xlink:type="simple" xlink:show="embed" xlink:actuate="onLoad" draw:mime-type="image/png"/></draw:frame></text:p>
      <text:p text:style-name="P12"/>
      <text:p text:style-name="P13">Корпус сварной. Общий вид</text:p>
      <text:p text:style-name="P12"><draw:frame draw:style-name="fr2" draw:name="Image25" text:anchor-type="char" svg:x="-0.323cm" svg:y="0.088cm" svg:width="8.01cm" svg:height="6.548cm" draw:z-index="24"><draw:image xlink:href="Pictures/100000010000029C0000022282035BE3.png" xlink:type="simple" xlink:show="embed" xlink:actuate="onLoad" draw:mime-type="image/png"/></draw:frame><draw:frame draw:style-name="fr2" draw:name="Image26" text:anchor-type="char" svg:x="7.904cm" svg:y="0.097cm" svg:width="8.467cm" svg:height="6.597cm" draw:z-index="25"><draw:image xlink:href="Pictures/1000000100000224000001ABF7D67B1A.png" xlink:type="simple" xlink:show="embed" xlink:actuate="onLoad" draw:mime-type="image/png"/></draw:frame></text:p>
      <text:h text:style-name="P7" text:outline-level="1"/>
      <text:h text:style-name="P8" text:outline-level="1">Сборка</text:h>
      <text:p text:style-name="Text_20_body"><draw:frame draw:style-name="fr2" draw:name="Image27" text:anchor-type="char" svg:x="-1.501cm" svg:y="-0.139cm" svg:width="9.813cm" svg:height="9.613cm" draw:z-index="26"><draw:image xlink:href="Pictures/100000010000024B0000023F747969C6.png" xlink:type="simple" xlink:show="embed" xlink:actuate="onLoad" draw:mime-type="image/png"/></draw:frame><draw:frame draw:style-name="fr2" draw:name="Image28" text:anchor-type="char" svg:x="2.281cm" svg:y="10.589cm" svg:width="11.848cm" svg:height="14.247cm" draw:z-index="27"><draw:image xlink:href="Pictures/1000000100000242000002B7A445A7F0.png" xlink:type="simple" xlink:show="embed" xlink:actuate="onLoad" draw:mime-type="image/png"/></draw:frame><draw:frame draw:style-name="fr2" draw:name="Image29" text:anchor-type="char" svg:x="8.687cm" svg:y="-0.182cm" svg:width="7.812cm" svg:height="9.596cm" draw:z-index="28"><draw:image xlink:href="Pictures/10000001000001BF00000225135C98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Regular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font-weight="normal"/>
    </style:style>
    <style:style style:name="Heading" style:family="paragraph" style:parent-style-name="Standard" style:next-style-name="Text_20_body" style:class="chapter" style:master-page-name="">
      <style:paragraph-properties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text-align="start" style:justify-single-word="false" fo:text-indent="1.251cm" style:auto-text-indent="false" style:page-number="auto">
        <style:tab-stops/>
      </style:paragraph-properties>
    </style:style>
    <style:style style:name="Title" style:family="paragraph" loext:hidden="true" style:hidden="true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text-align="center" style:justify-single-word="false" fo:text-indent="0cm" style:auto-text-indent="false" style:page-number="auto"/>
      <style:text-properties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style:page-number="auto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style:page-number="auto"/>
    </style:style>
    <style:style style:name="Heading_20_5" style:display-name="Heading 5" style:family="paragraph" loext:hidden="true" style:hidden="true" style:parent-style-name="Heading" style:next-style-name="Text_20_body" style:default-outline-level="5" style:class="chapter"/>
    <style:style style:name="Heading_20_6" style:display-name="Heading 6" style:family="paragraph" loext:hidden="true" style:hidden="true" style:parent-style-name="Heading" style:next-style-name="Text_20_body" style:default-outline-level="6" style:class="chapter"/>
    <style:style style:name="Heading_20_7" style:display-name="Heading 7" style:family="paragraph" loext:hidden="true" style:hidden="true" style:parent-style-name="Heading" style:next-style-name="Text_20_body" style:default-outline-level="7" style:class="chapter"/>
    <style:style style:name="Addressee" style:family="paragraph" loext:hidden="true" style:hidden="true" style:parent-style-name="Other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Other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_5f_Listing_5f_text" style:display-name="Code_Listing_text" style:family="paragraph" style:parent-style-name="Standard" style:class="text">
      <style:paragraph-properties fo:line-height="150%" fo:text-indent="0cm" style:auto-text-indent="false">
        <style:tab-stops/>
      </style:paragraph-properties>
      <style:text-properties style:font-name="Courier New" fo:font-family="'Courier New'" style:font-style-name="Обычный" style:font-family-generic="modern" style:font-pitch="fixed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fo:text-indent="0cm" style:auto-text-indent="false" text:number-lines="false" text:line-number="0">
        <style:tab-stops/>
      </style:paragraph-properties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1.251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text-indent="1.251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List" style:family="paragraph" loext:hidden="true" style:hidden="true" style:parent-style-name="Other" style:class="list"/>
    <style:style style:name="List_20_Indent" style:display-name="List Indent" style:family="paragraph" loext:hidden="true" style:hidden="true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loext:hidden="true" style:hidden="true" style:parent-style-name="Heading" style:next-style-name="Text_20_body" style:default-outline-level="8" style:class="chapter"/>
    <style:style style:name="Heading_20_9" style:display-name="Heading 9" style:family="paragraph" loext:hidden="true" style:hidden="true" style:parent-style-name="Heading" style:next-style-name="Text_20_body" style:default-outline-level="9" style:class="chapter"/>
    <style:style style:name="Heading_20_10" style:display-name="Heading 10" style:family="paragraph" loext:hidden="true" style:hidden="true" style:parent-style-name="Heading" style:next-style-name="Text_20_body" style:default-outline-level="10" style:class="chapter"/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loext:hidden="true" style:hidden="true" style:parent-style-name="Other" style:class="text">
      <style:paragraph-properties text:number-lines="false" text:line-number="0"/>
    </style:style>
    <style:style style:name="Sender" style:family="paragraph" loext:hidden="true" style:hidden="true" style:parent-style-name="Other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loext:hidden="true" style:hidden="true" style:parent-style-name="Other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</style:style>
    <style:style style:name="Salutation" style:family="paragraph" loext:hidden="true" style:hidden="true" style:parent-style-name="Other" style:class="text">
      <style:paragraph-properties text:number-lines="false" text:line-number="0"/>
    </style:style>
    <style:style style:name="Endnote" style:family="paragraph" loext:hidden="true" style:hidden="true" style:parent-style-name="Other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Other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Other" style:class="extra"/>
    <style:style style:name="Horizontal_20_Line" style:display-name="Horizontal Line" style:family="paragraph" loext:hidden="true" style:hidden="true" style:parent-style-name="Other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loext:hidden="true" style:hidden="true" style:parent-style-name="Other" style:next-style-name="List_20_Contents" style:class="html">
      <style:paragraph-properties fo:margin-left="0cm"/>
    </style:style>
    <style:style style:name="List_20_Contents" style:display-name="List Contents" style:family="paragraph" loext:hidden="true" style:hidden="true" style:parent-style-name="Other" style:class="html">
      <style:paragraph-properties fo:margin-left="1cm"/>
    </style:style>
    <style:style style:name="Other" style:family="paragraph" loext:hidden="true" style:hidden="true"/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Рисунок" style:family="paragraph" style:parent-style-name="Caption">
      <style:paragraph-properties fo:text-align="center" style:justify-single-word="false"/>
    </style:style>
    <style:style style:name="Таблица" style:family="paragraph" style:parent-style-name="Caption"/>
    <style:style style:name="Листинг" style:family="paragraph" style:parent-style-name="Caption" style:list-style-name="Listing"/>
    <style:style style:name="Листинг_20__28_А_2f_Б_2f_..._29_" style:display-name="Листинг (А/Б/...)" style:family="paragraph" style:parent-style-name="Caption" style:list-style-name="Listing_20_Appendix"/>
    <style:style style:name="Foot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auto-update="true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auto-update="true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auto-update="true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left" style:display-name="Header left" style:family="paragraph" style:parent-style-name="Header" style:auto-update="true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right" style:display-name="Header right" style:family="paragraph" style:parent-style-name="Header" style:auto-update="true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Lists" style:family="paragraph" style:parent-style-name="Standard" style:class="text" style:master-page-name="">
      <style:paragraph-properties fo:margin-left="1.75cm" style:page-number="auto"/>
    </style:style>
    <style:style style:name="Ordered_20_list_20_1_29_2_29_3_29_" style:display-name="Ordered list 1)2)3)" style:family="paragraph" style:parent-style-name="Lists" style:list-style-name="Numbering_20_123" style:class="text">
      <style:paragraph-properties fo:margin-left="2.251cm" fo:text-indent="-0.499cm" style:auto-text-indent="false">
        <style:tab-stops/>
      </style:paragraph-properties>
    </style:style>
    <style:style style:name="Marked_20_list" style:display-name="Marked list" style:family="paragraph" style:parent-style-name="Lists" style:list-style-name="Bullet_20__2013__20_for_20_style" style:class="text">
      <style:paragraph-properties>
        <style:tab-stops/>
      </style:paragraph-properties>
      <style:text-properties fo:font-weight="normal" style:font-weight-asian="normal" style:font-weight-complex="normal"/>
    </style:style>
    <style:style style:name="Variable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font-name="Times New Roman" fo:font-family="'Times New Roman'" style:font-style-name="Обычный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/>
    </style:style>
    <style:style style:name="Citation" style:family="text">
      <style:text-properties fo:font-style="italic"/>
    </style:style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Caption_20_characters" style:display-name="Caption characters" style:family="text"/>
    <style:style style:name="_24__20_Web_20_text" style:display-name="$ Web text" style:family="text">
      <style:text-properties style:font-name="Calibri" fo:font-family="Calibri" style:font-style-name="Regular" style:font-family-generic="swiss" style:font-pitch="variable" fo:font-size="14pt"/>
    </style:style>
    <style:style style:name="Footnote_20_Symbol" style:display-name="Footnote Symbol" style:family="text">
      <style:text-properties style:font-name="Times New Roman" fo:font-family="'Times New Roman'" style:font-style-name="Обычный" style:font-family-generic="roman" style:font-pitch="variable"/>
    </style:style>
    <style:style style:name="Footnote_20_anchor" style:display-name="Footnote anchor" style:family="text">
      <style:text-properties style:text-position="super 58%" style:font-name="Times New Roman" fo:font-family="'Times New Roman'" style:font-style-name="Обычный" style:font-family-generic="roman" style:font-pitch="variable"/>
    </style:style>
    <style:style style:name="Endnote_20_anchor" style:display-name="Endnote anchor" style:family="text">
      <style:text-properties style:text-position="super 58%" style:font-name="Times New Roman" fo:font-family="'Times New Roman'" style:font-style-name="Обычный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 fo:text-indent="1.251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space" fo:text-indent="-0.501cm" fo:margin-left="2.25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 fo:text-align="end">
          <style:list-level-label-alignment text:label-followed-by="space" fo:text-indent="-0.501cm" fo:margin-left="2.25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499cm" fo:margin-left="1.499cm"/>
        </style:list-level-properties>
        <style:text-properties fo:font-family="OpenSymbol" style:font-style-name="Regular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style:font-name="OpenSymbol"/>
      </text:list-level-style-bullet>
    </text:list-style>
    <text:list-style style:name="For_20_src_20_1.2.3." style:display-name="For src 1.2.3.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1.251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15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79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1.42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2.06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2.69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3.33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3.96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4.6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5.235cm" fo:margin-left="6.985cm"/>
        </style:list-level-properties>
        <style:text-properties style:font-name="OpenSymbol"/>
      </text:list-level-style-bullet>
    </text:list-style>
    <text:list-style style:name="Listing_20_Appendix" style:display-name="Listing Appendix">
      <text:list-level-style-number text:level="1" text:style-name="Numbering_20_Symbols" loext:num-list-format="Листинг А.%1% –" style:num-prefix="Листинг А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Приложение Б.%2% –" style:num-prefix="Приложение Б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Приложение В.%3%  –" style:num-prefix="Приложение В." style:num-suffix=" 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Приложение Г.%4% –" style:num-prefix="Приложение Г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Приложение Д.%5% –" style:num-prefix="Приложение Д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Приложение Е.%6% –" style:num-prefix="Приложение Е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Приложение Ж.%7% –" style:num-prefix="Приложение Ж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Приложение З.%8% –" style:num-prefix="Приложение З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Приложение И.%9% –" style:num-prefix="Приложение И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Приложение К.%10% –" style:num-prefix="Приложение К.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isting">
      <text:list-level-style-number text:level="1" loext:num-list-format="Листинг %1% –" style:num-prefix="Листинг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Листинг %2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Листинг %3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Листинг %4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Листинг %5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Листинг %6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Листинг %7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Листинг %8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Листинг %9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Листинг %10%" style:num-prefix="Листинг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Bullet_20__2013__20_for_20_style" style:display-name="Bullet – for style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501cm" fo:margin-left="2.251cm"/>
        </style:list-level-properties>
        <style:text-properties fo:font-family="OpenSymbol" style:font-style-name="Regular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space" fo:text-indent="-0.6cm" fo:margin-left="2.8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499cm" fo:margin-left="3.35cm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  <style:master-page style:name="CourseWork" style:page-layout-name="Mpm9" draw:style-name="Mdp1">
      <style:footer>
        <text:p text:style-name="MP1"><text:bookmark-start text:name="PageNumWizard_FOOTER_Курсовая1 Копия 4"/><text:page-number text:select-page="current">0</text:page-number><text:bookmark-end text:name="PageNumWizard_FOOTER_Курсовая1 Копия 4"/></text:p>
      </style:footer>
      <style:footer-first>
        <text:p text:style-name="MP1"><text:bookmark text:name="PageNumWizard_FOOTER_Курсовая1 Копия 4 Копия 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20:28:34.608108300</meta:creation-date>
    <dc:title>Default</dc:title>
    <meta:editing-cycles>2</meta:editing-cycles>
    <meta:generator>LibreOffice/25.8.5.2$Windows_X86_64 LibreOffice_project/9c8b85f387cc00a89945a79c9e6239f32e450ac2</meta:generator>
    <meta:editing-duration>PT4M47S</meta:editing-duration>
    <dc:date>2026-04-09T21:53:13.298583500</dc:date>
    <meta:document-statistic meta:table-count="0" meta:image-count="29" meta:object-count="0" meta:page-count="8" meta:paragraph-count="25" meta:word-count="78" meta:character-count="525" meta:non-whitespace-character-count="475"/>
    <meta:template xlink:type="simple" xlink:actuate="onRequest" xlink:title="Default" xlink:href="file:///C:/Users/pavel/AppData/Roaming/LibreOffice/4/user/template/Default1.ott" meta:date="2026-04-09T20:28:34.377904600"/>
  </office:meta>
</office:document-meta>
</file>